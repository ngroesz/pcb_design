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officeooo:rsid="001e766d" officeooo:paragraph-rsid="001e766d"/>
    </style:style>
    <style:style style:name="P2" style:family="paragraph" style:parent-style-name="Frame_20_contents">
      <style:paragraph-properties fo:text-align="center" style:justify-single-word="false"/>
      <style:text-properties fo:font-size="14pt" fo:font-weight="bold" officeooo:rsid="001e766d" officeooo:paragraph-rsid="001e766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officeooo:rsid="00202bdb" officeooo:paragraph-rsid="00202bd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text-properties officeooo:rsid="001d851f" officeooo:paragraph-rsid="001d851f"/>
    </style:style>
    <style:style style:name="P8" style:family="paragraph" style:parent-style-name="Standard">
      <style:paragraph-properties fo:text-align="center" style:justify-single-word="false"/>
      <style:text-properties officeooo:rsid="001d851f" officeooo:paragraph-rsid="001d851f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5a0d3" officeooo:paragraph-rsid="001e766d" style:font-size-asian="16pt" style:font-weight-asian="bold" style:font-size-complex="16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e766d" officeooo:paragraph-rsid="001e766d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e766d" officeooo:paragraph-rsid="001e766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e766d" officeooo:paragraph-rsid="001e766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2bdb" officeooo:paragraph-rsid="00202bdb" style:font-weight-asian="normal" style:font-weight-complex="normal"/>
    </style:style>
    <style:style style:name="T1" style:family="text">
      <style:text-properties style:font-name="Liberation Serif" fo:font-size="14pt" fo:font-style="normal" fo:font-weight="bold" style:font-size-asian="14pt" style:font-style-asian="normal" style:font-weight-asian="bold"/>
    </style:style>
    <style:style style:name="T2" style:family="text">
      <style:text-properties style:font-name="Liberation Serif" fo:font-size="14pt" fo:font-style="normal" style:font-size-asian="14pt" style:font-style-asian="normal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5" style:family="text">
      <style:text-properties style:font-name="Liberation Serif" fo:font-size="12pt" fo:font-style="normal" style:font-size-asian="12pt" style:font-style-asian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font-size-asian="21pt" style:font-size-complex="24pt"/>
    </style:style>
    <style:style style:name="T8" style:family="text">
      <style:text-properties fo:font-size="24pt" officeooo:rsid="0021dce0" style:font-size-asian="21pt" style:font-size-complex="24pt"/>
    </style:style>
    <style:style style:name="T9" style:family="text">
      <style:text-properties officeooo:rsid="0021dce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>
        <style:columns fo:column-count="1" fo:column-gap="0in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Frame1" text:anchor-type="paragraph" svg:x="-0.2756in" svg:y="1.161in" svg:width="3.4291in" draw:z-index="0"><draw:text-box fo:min-height="5.3445in"><text:p text:style-name="P4"><text:span text:style-name="T1">Component Values</text:span></text:p><text:p text:style-name="P5"><text:span text:style-name="T3">C1: 10 µF</text:span></text:p><text:p text:style-name="P5"><text:span text:style-name="T3">C2: 100 µF</text:span></text:p><text:p text:style-name="P5"><text:span text:style-name="T3">C3: 10 µF</text:span></text:p><text:p text:style-name="P5"><text:span text:style-name="T3">C4: </text:span></text:p><text:p text:style-name="P5"><text:span text:style-name="T3">C5: 100 nF</text:span></text:p><text:p text:style-name="P5"><text:span text:style-name="T3">C6: 100 nF</text:span></text:p><text:p text:style-name="P5"><text:span text:style-name="T3">C7: 22 pF</text:span></text:p><text:p text:style-name="P5"><text:span text:style-name="T3">C8: 22 pF</text:span></text:p><text:p text:style-name="P5"><text:span text:style-name="T3">C9: 100 nF</text:span></text:p><text:p text:style-name="P5"><text:span text:style-name="T3">C10: 100 nF</text:span></text:p><text:p text:style-name="P5"><text:span text:style-name="T3">C11:</text:span></text:p><text:p text:style-name="P5"><text:span text:style-name="T3">C12:</text:span></text:p><text:p text:style-name="P5"><text:span text:style-name="T3">C13:</text:span></text:p><text:p text:style-name="P5"><text:span text:style-name="T3">C14: 100 nF</text:span></text:p><text:p text:style-name="P5"><text:span text:style-name="T3">C15: 100 nF</text:span></text:p><text:p text:style-name="P5"/><text:p text:style-name="P5"><text:span text:style-name="T3">R1: 10k Ω</text:span></text:p><text:p text:style-name="P5"><text:span text:style-name="T3">R2: 10k Ω</text:span></text:p><text:p text:style-name="P5"><text:span text:style-name="T3">R3: 10k Ωf</text:span></text:p><text:p text:style-name="Standard"/></draw:text-box></draw:frame><draw:frame draw:style-name="fr1" draw:name="Frame2" text:anchor-type="paragraph" svg:x="3.4681in" svg:y="1.1563in" svg:width="3.9299in" draw:z-index="1"><draw:text-box fo:min-height="5.4846in"><text:p text:style-name="P8"><text:span text:style-name="T1">Pinout</text:span></text:p><text:p text:style-name="P13"><text:span text:style-name="T2">[Regardless of the actual pin value on the board, these pins are numbered from left to right, when facing the header, looking toward the edge of the board.]</text:span></text:p><text:p text:style-name="P13"><text:span text:style-name="T2"/></text:p><text:p text:style-name="P5"><text:span text:style-name="T4">Programming Header:</text:span></text:p><text:list xml:id="list1092993886" text:style-name="L1"><text:list-item><text:p text:style-name="P6"><text:span text:style-name="T3">Reset</text:span></text:p></text:list-item><text:list-item><text:p text:style-name="P6"><text:span text:style-name="T3">Tx</text:span></text:p></text:list-item><text:list-item><text:p text:style-name="P6"><text:span text:style-name="T3">Rx</text:span></text:p></text:list-item><text:list-item><text:p text:style-name="P6"><text:span text:style-name="T3">4.5V</text:span></text:p></text:list-item><text:list-item><text:p text:style-name="P6"><text:span text:style-name="T3">No Connection</text:span></text:p></text:list-item><text:list-item><text:p text:style-name="P6"><text:span text:style-name="T3">Gnd</text:span></text:p></text:list-item></text:list><text:p text:style-name="P5"><text:span text:style-name="T3"/></text:p><text:p text:style-name="P12"><text:span text:style-name="T5">Power Out:</text:span></text:p><text:list xml:id="list153744623" text:style-name="L2"><text:list-item><text:p text:style-name="P10"><text:span text:style-name="T3">4.5 V</text:span></text:p></text:list-item><text:list-item><text:p text:style-name="P10"><text:span text:style-name="T3">Gnd</text:span></text:p><text:p text:style-name="P10"><text:span text:style-name="T3"/></text:p></text:list-item></text:list><text:p text:style-name="P12"><text:span text:style-name="T5">SigOut:</text:span></text:p><text:list xml:id="list3161711282" text:style-name="L3"><text:list-item><text:p text:style-name="P11"><text:span text:style-name="T3">IRRx</text:span></text:p></text:list-item><text:list-item><text:p text:style-name="P11"><text:span text:style-name="T3">IRTx</text:span></text:p></text:list-item><text:list-item><text:p text:style-name="P11"><text:span text:style-name="T3">SDA</text:span></text:p></text:list-item><text:list-item><text:p text:style-name="P11"><text:span text:style-name="T3">SCL</text:span></text:p></text:list-item></text:list><text:p text:style-name="P5"><text:span text:style-name="T3"/></text:p><text:p text:style-name="P5"><text:span text:style-name="T3"/></text:p><text:p text:style-name="P7"/></draw:text-box></draw:frame><draw:frame draw:style-name="fr1" draw:name="Frame3" text:anchor-type="paragraph" svg:x="-0.2799in" svg:y="6.5417in" svg:width="3.4437in" draw:z-index="2"><draw:text-box fo:min-height="2.6516in"><text:p text:style-name="P2">Hookups</text:p><text:p text:style-name="P1">Encoder 0: Right wheel</text:p><text:p text:style-name="P1">Encoder 1: Left wheel</text:p><text:p text:style-name="P1">Encoder 2: Turret motor</text:p><text:p text:style-name="P1">Encoder 3: Turret calibration</text:p><text:p text:style-name="P1"/><text:p text:style-name="P3">Bump 0: Front bumper</text:p><text:p text:style-name="P3">Bump 1: Rear bumper</text:p></draw:text-box></draw:frame><text:span text:style-name="T7">M</text:span><text:span text:style-name="T7">ain</text:span><text:span text:style-name="T6"> Board Build Cheat She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18:13:31.732605069</meta:creation-date>
    <dc:date>2026-06-21T18:31:28.161568720</dc:date>
    <meta:editing-duration>PT7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4" meta:word-count="138" meta:character-count="611" meta:non-whitespace-character-count="528"/>
  </office:meta>
</office:document-meta>
</file>