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officeooo:rsid="001e766d" officeooo:paragraph-rsid="001e766d"/>
    </style:style>
    <style:style style:name="P2" style:family="paragraph" style:parent-style-name="Frame_20_contents">
      <style:paragraph-properties fo:text-align="center" style:justify-single-word="false"/>
      <style:text-properties fo:font-size="14pt" fo:font-weight="bold" officeooo:rsid="001e766d" officeooo:paragraph-rsid="001e766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officeooo:rsid="00202bdb" officeooo:paragraph-rsid="00202bdb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rsid="001d851f" officeooo:paragraph-rsid="001d851f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style="normal" fo:font-weight="bold" style:font-size-asian="14pt" style:font-style-asian="normal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style="normal" fo:font-weight="bold" officeooo:rsid="001d851f" officeooo:paragraph-rsid="001d851f" style:font-size-asian="14pt" style:font-style-asian="normal" style:font-weight-asian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202bdb" officeooo:paragraph-rsid="00202bdb" style:font-size-asian="14pt" style:font-style-asian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01e766d" officeooo:paragraph-rsid="001e766d" style:font-size-asian="12pt" style:font-style-asian="normal" style:font-weight-asian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normal" fo:font-weight="normal" officeooo:rsid="001e766d" officeooo:paragraph-rsid="001e766d" style:font-size-asian="12pt" style:font-style-asian="normal" style:font-weight-asian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e766d" officeooo:paragraph-rsid="001e766d" style:font-size-asian="12pt" style:font-style-asian="normal" style:font-weight-asian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37778" officeooo:paragraph-rsid="00237778" style:font-size-asian="12pt" style:font-style-asian="normal" style:font-weight-asian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iberation Serif" fo:font-size="12pt" fo:font-style="normal" fo:font-weight="normal" officeooo:rsid="002474f8" officeooo:paragraph-rsid="002474f8" style:font-size-asian="12pt" style:font-style-asian="normal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Liberation Serif" fo:font-size="12pt" fo:font-style="normal" fo:font-weight="normal" officeooo:rsid="002474f8" officeooo:paragraph-rsid="002474f8" style:font-size-asian="12pt" style:font-style-asian="normal" style:font-weight-asian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style:font-size-asian="12pt" style:font-style-asian="normal" style:font-weight-asian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1e766d" officeooo:paragraph-rsid="001e766d" style:font-size-asian="12pt" style:font-style-asian="normal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1e766d" officeooo:paragraph-rsid="002474f8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5a0d3" officeooo:paragraph-rsid="001e766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2474f8" officeooo:paragraph-rsid="002474f8" style:font-size-asian="12.25pt" style:font-weight-asian="bold" style:font-size-complex="1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font-size-asian="21pt" style:font-size-complex="24pt"/>
    </style:style>
    <style:style style:name="T3" style:family="text">
      <style:text-properties officeooo:rsid="002474f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>
        <style:columns fo:column-count="1" fo:column-gap="0in"/>
      </style:graphic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2" draw:name="Frame1" text:anchor-type="paragraph" svg:x="-0.2756in" svg:y="1.161in" svg:width="3.4291in" draw:z-index="0"><draw:text-box fo:min-height="5.3445in"><text:p text:style-name="P6">Component Values</text:p><text:p text:style-name="P9">C1: 10 µF</text:p><text:p text:style-name="P9">C2: 100 µF</text:p><text:p text:style-name="P9">C3: 10 µF</text:p><text:p text:style-name="P9">C4: </text:p><text:p text:style-name="P9">C5: 100 nF</text:p><text:p text:style-name="P9">C6: 100 nF</text:p><text:p text:style-name="P9">C7: 22 pF</text:p><text:p text:style-name="P9">C8: 22 pF</text:p><text:p text:style-name="P9">C9: 100 nF</text:p><text:p text:style-name="P9">C10: 100 nF</text:p><text:p text:style-name="P9">C11:</text:p><text:p text:style-name="P9">C12:</text:p><text:p text:style-name="P9">C13:</text:p><text:p text:style-name="P9">C14: 100 nF</text:p><text:p text:style-name="P9">C15: 100 nF</text:p><text:p text:style-name="P4"/><text:p text:style-name="P9">R1: 10k Ω</text:p><text:p text:style-name="P9">R2: 10k Ω</text:p><text:p text:style-name="P9">R3: 10k Ωf</text:p><text:p text:style-name="P9"/><text:p text:style-name="P14">U2: ATMEGA328P-PU</text:p><text:p text:style-name="P14">U3: SN74HC595</text:p><text:p text:style-name="P14">U4: L293D</text:p><text:p text:style-name="P14">U5: L293D</text:p><text:p text:style-name="Standard"/></draw:text-box></draw:frame><draw:frame draw:style-name="fr1" draw:name="Frame2" text:anchor-type="paragraph" svg:x="3.4681in" svg:y="1.1563in" svg:width="3.9299in" draw:z-index="1"><draw:text-box fo:min-height="6.1827in"><text:p text:style-name="P7">Pinout</text:p><text:p text:style-name="P8">[Regardless of the actual pin value on the board, these pins are numbered from left to right, when facing the header, looking toward the edge of the board.]</text:p><text:p text:style-name="P8"/><text:p text:style-name="P17">Programming Header:</text:p><text:list xml:id="list2589883268" text:style-name="L1"><text:list-item><text:p text:style-name="P10">Reset</text:p></text:list-item><text:list-item><text:p text:style-name="P10">Tx</text:p></text:list-item><text:list-item><text:p text:style-name="P10">Rx</text:p></text:list-item><text:list-item><text:p text:style-name="P10">4.5V</text:p></text:list-item><text:list-item><text:p text:style-name="P10">No Connection</text:p></text:list-item><text:list-item><text:p text:style-name="P10">Gnd</text:p></text:list-item></text:list><text:p text:style-name="P9"/><text:p text:style-name="P18">Power Out:</text:p><text:list xml:id="list3465268239" text:style-name="L2"><text:list-item><text:p text:style-name="P11">4.5 V</text:p></text:list-item><text:list-item><text:p text:style-name="P11">Gnd</text:p><text:p text:style-name="P11"/></text:list-item></text:list><text:p text:style-name="P18">SigOut:</text:p><text:list xml:id="list605228780" text:style-name="L3"><text:list-item><text:p text:style-name="P12">IRRx</text:p></text:list-item><text:list-item><text:p text:style-name="P12">IRTx</text:p></text:list-item><text:list-item><text:p text:style-name="P12">SDA</text:p></text:list-item><text:list-item><text:p text:style-name="P12">SCL</text:p></text:list-item></text:list><text:p text:style-name="P13"/><text:p text:style-name="P19"><text:span text:style-name="T3">PowerIn</text:span>:</text:p><text:list xml:id="list970614427" text:style-name="L4"><text:list-item><text:p text:style-name="P15">Positive</text:p></text:list-item><text:list-item><text:p text:style-name="P15">Negative</text:p></text:list-item></text:list><text:p text:style-name="P19"/><text:p text:style-name="P19"><text:span text:style-name="T3">Motors</text:span>:</text:p><text:list xml:id="list324358041" text:style-name="L5"><text:list-item><text:p text:style-name="P16">Red</text:p></text:list-item><text:list-item><text:p text:style-name="P16">Black</text:p></text:list-item></text:list><text:p text:style-name="P9"/><text:p text:style-name="P5"/></draw:text-box></draw:frame><draw:frame draw:style-name="fr1" draw:name="Frame3" text:anchor-type="paragraph" svg:x="-0.2799in" svg:y="6.5417in" svg:width="3.4437in" draw:z-index="2"><draw:text-box fo:min-height="2.6516in"><text:p text:style-name="P2">Hookups</text:p><text:p text:style-name="P1">Encoder 0: Right wheel</text:p><text:p text:style-name="P1">Encoder 1: Left wheel</text:p><text:p text:style-name="P1">Encoder 2: Turret motor</text:p><text:p text:style-name="P1">Encoder 3: Turret calibration</text:p><text:p text:style-name="P1"/><text:p text:style-name="P3">Bump 0: Front bumper</text:p><text:p text:style-name="P3">Bump 1: Rear bumper</text:p></draw:text-box></draw:frame><text:span text:style-name="T2">Main</text:span><text:span text:style-name="T1"> Board Build Cheat Sheet</text:span></text:p>
      <text:p text:style-name="P21">Remember to clean PCB with alcohol before assembl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18:13:31.732605069</meta:creation-date>
    <dc:date>2026-06-27T13:18:07.096400467</dc:date>
    <meta:editing-duration>PT11M2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55" meta:word-count="164" meta:character-count="759" meta:non-whitespace-character-count="665"/>
  </office:meta>
</office:document-meta>
</file>